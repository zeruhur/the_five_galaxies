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3">
        <text:list-item>
          <text:p text:style-name="P3">Order of Ascendancy research cell</text:p>
        </text:list-item>
        <text:list-item>
          <text:p text:style-name="P3">Technocratic Union — official survey license</text:p>
        </text:list-item>
        <text:list-item>
          <text:p text:style-name="P3">Technocratic Union — unofficial, classification circumvented</text:p>
        </text:list-item>
        <text:list-item>
          <text:p text:style-name="P3">Avaros academic institution</text:p>
        </text:list-item>
        <text:list-item>
          <text:p text:style-name="P3">Dominion of Aquilaria noble house (artifact acquisition)</text:p>
        </text:list-item>
        <text:list-item>
          <text:p text:style-name="P3">Commonwealth of Elyros survey division</text:p>
        </text:list-item>
        <text:list-item>
          <text:p text:style-name="P3">Void Consortium commercial arm</text:p>
        </text:list-item>
        <text:list-item>
          <text:p text:style-name="P3">GCP heritage documentation mandate</text:p>
        </text:list-item>
        <text:list-item>
          <text:p text:style-name="P3">Private collector — identity withheld</text:p>
        </text:list-item>
        <text:list-item>
          <text:p text:style-name="P3">Terran Compact research bureau</text:p>
        </text:list-item>
        <text:list-item>
          <text:p text:style-name="P3">Hetsusian Enclave clan (third-party access brokering)</text:p>
        </text:list-item>
        <text:list-item>
          <text:p text:style-name="P3">No client — coordinates the team wasn’t supposed to have</text:p>
        </text:list-item>
      </text:list>
      <text:p text:style-name="First_20_paragraph"><text:span text:style-name="T1">Objective</text:span></text:p>
      <text:list text:style-name="L4">
        <text:list-item>
          <text:p text:style-name="P4">Document site architecture and produce a registered survey record</text:p>
        </text:list-item>
        <text:list-item>
          <text:p text:style-name="P4">Retrieve a specific artifact without triggering site response systems</text:p>
        </text:list-item>
        <text:list-item>
          <text:p text:style-name="P4">Extract a data core before a competing party reaches it</text:p>
        </text:list-item>
        <text:list-item>
          <text:p text:style-name="P4">Translate an active transmission and determine its destination</text:p>
        </text:list-item>
        <text:list-item>
          <text:p text:style-name="P4">Assess site stability before it becomes permanently inaccessible</text:p>
        </text:list-item>
        <text:list-item>
          <text:p text:style-name="P4">Interface with active technology and document its current function</text:p>
        </text:list-item>
        <text:list-item>
          <text:p text:style-name="P4">Recover biological material from a sealed environment</text:p>
        </text:list-item>
        <text:list-item>
          <text:p text:style-name="P4">Verify whether a previous team made it out — and what they found</text:p>
        </text:list-item>
        <text:list-item>
          <text:p text:style-name="P4">Plant a monitoring device without the site registering its presence</text:p>
        </text:list-item>
        <text:list-item>
          <text:p text:style-name="P4">Prevent a competing party from extracting something they shouldn’t have</text:p>
        </text:list-item>
        <text:list-item>
          <text:p text:style-name="P4">Determine the origin of a transmission that matches no known civilization</text:p>
        </text:list-item>
        <text:list-item>
          <text:p text:style-name="P4">Find what Survey Expedition SY-7 was approaching when its transmissions were classified</text:p>
        </text:list-item>
      </text:list>
      <text:p text:style-name="First_20_paragraph"><text:span text:style-name="T1">Site</text:span> (d12)</text:p>
      <text:list text:style-name="L5">
        <text:list-item>
          <text:p text:style-name="P5">Xalith ruin in Hetsusian Enclave — clan access, Skopalian patrols on the perimeter</text:p>
        </text:list-item>
        <text:list-item>
          <text:p text:style-name="P5">Celestial Dominion outer structure — Aquilarian exclusion perimeter, external monitoring active</text:p>
        </text:list-item>
        <text:list-item>
          <text:p text:style-name="P5">Celestial Dominion interior section — sealed, requires breach of existing security</text:p>
        </text:list-item>
        <text:list-item>
          <text:p text:style-name="P5">Elysian vault site — under Imperial quarantine, multiple access claims on file</text:p>
        </text:list-item>
        <text:list-item>
          <text:p text:style-name="P5">Precursor belt system — Rim Concord restricted zone, Zynthari monitoring suspected</text:p>
        </text:list-item>
        <text:list-item>
          <text:p text:style-name="P5">Dead zone site — no WAN, oddspace-only approach, no external communication during operation</text:p>
        </text:list-item>
        <text:list-item>
          <text:p text:style-name="P5">Derelict station built over a pre-collapse foundation — unclear what is ship and what is ruin</text:p>
        </text:list-item>
        <text:list-item>
          <text:p text:style-name="P5">Site in contested border region — two polities claim jurisdiction, neither currently enforcing</text:p>
        </text:list-item>
        <text:list-item>
          <text:p text:style-name="P5">Site under GCP heritage designation — officially protected, access illegal, enforcement inconsistent</text:p>
        </text:list-item>
        <text:list-item>
          <text:p text:style-name="P5">Newly discovered site — no survey data exists; the briefing is inference from a signal</text:p>
        </text:list-item>
        <text:list-item>
          <text:p text:style-name="P5">Site previously accessed by another team — their survey is incomplete, and they didn’t all come back</text:p>
        </text:list-item>
        <text:list-item>
          <text:p text:style-name="P5">Xalith Rift adjacent — oddspace anomalies affect navigation and electronics throughout the operation</text:p>
        </text:list-item>
      </text:list>
      <text:p text:style-name="First_20_paragraph"><text:span text:style-name="T1">Complication</text:span></text:p>
      <text:list text:style-name="L6">
        <text:list-item>
          <text:p text:style-name="P6">The site’s condition is significantly more active than the briefing indicated</text:p>
        </text:list-item>
        <text:list-item>
          <text:p text:style-name="P6">A competing team is already inside, or arrives during the operation</text:p>
        </text:list-item>
        <text:list-item>
          <text:p text:style-name="P6">The client’s stated objective conceals a secondary retrieval the team wasn’t briefed on</text:p>
        </text:list-item>
        <text:list-item>
          <text:p text:style-name="P6">A team member begins accumulating Resonance faster than expected</text:p>
        </text:list-item>
        <text:list-item>
          <text:p text:style-name="P6">Access to the target area requires interfacing with active systems — no passive route exists</text:p>
        </text:list-item>
        <text:list-item>
          <text:p text:style-name="P6">Polity patrol presence has increased since the approach window was confirmed</text:p>
        </text:list-item>
        <text:list-item>
          <text:p text:style-name="P6">The site is transmitting something the team’s equipment begins responding to</text:p>
        </text:list-item>
        <text:list-item>
          <text:p text:style-name="P6">Extracting the target physically will trigger a site response; documentation only avoids it</text:p>
        </text:list-item>
        <text:list-item>
          <text:p text:style-name="P6">A previous team’s equipment is still inside — and still active</text:p>
        </text:list-item>
        <text:list-item>
          <text:p text:style-name="P6">The site’s geometry doesn’t match any survey approach data; the briefing map is wrong</text:p>
        </text:list-item>
        <text:list-item>
          <text:p text:style-name="P6">Something inside the site has moved since the last recorded survey</text:p>
        </text:list-item>
        <text:list-item>
          <text:p text:style-name="P6">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7">
        <text:list-item>
          <text:p text:style-name="P7"><text:span text:style-name="T1">Study</text:span>: Increase a skill or review recovered site data</text:p>
        </text:list-item>
        <text:list-item>
          <text:p text:style-name="P7"><text:span text:style-name="T1">Recover</text:span>: Heal injuries, repair gear, or clear 1 Resonance through rest</text:p>
        </text:list-item>
        <text:list-item>
          <text:p text:style-name="P7"><text:span text:style-name="T1">Consult</text:span>: Create a new TIE with a specialist or institution, or shift an existing TIE by ±1</text:p>
        </text:list-item>
        <text:list-item>
          <text:p text:style-name="P7"><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8">
        <text:list-item>
          <text:p text:style-name="P8"><text:span text:style-name="T1">Set Expectations</text:span>: Consider what your operative knows about the site going in, and what the site’s condition suggests about what you’ll find.</text:p>
        </text:list-item>
        <text:list-item>
          <text:p text:style-name="P8"><text:span text:style-name="T1">Test Uncertainty</text:span>: When the site’s response or another party’s action is unclear, ask the oracle a closed question.</text:p>
        </text:list-item>
        <text:list-item>
          <text:p text:style-name="P8"><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9">
        <text:list-item>
          <text:p text:style-name="P9"><text:span text:style-name="T1">1–2 No, and…</text:span>: What you expected doesn’t happen, and things get worse.</text:p>
        </text:list-item>
        <text:list-item>
          <text:p text:style-name="P9"><text:span text:style-name="T1">3–4 Yes, but…</text:span>: What you expected happens, but with a complication.</text:p>
        </text:list-item>
        <text:list-item>
          <text:p text:style-name="P9"><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COLD SIGNAL</dc:title>
    <dc:description/>
    <dc:subject/>
    <meta:keyword/>
    <dc:language>en</dc:language>
    <meta:initial-creator>Roberto Bisceglie</meta:initial-creator>
    <dc:creator>Roberto Bisceglie</dc:creator>
    <meta:creation-date>2026-06-04T07:36:35Z</meta:creation-date>
    <dc:date>2026-06-04T07:36:3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