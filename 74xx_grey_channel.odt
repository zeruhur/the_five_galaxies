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3">
        <text:list-item>
          <text:p text:style-name="P3"><text:span text:style-name="T1">d10</text:span>: Solid. Background checks pass. Your story holds under direct questioning.</text:p>
        </text:list-item>
        <text:list-item>
          <text:p text:style-name="P3"><text:span text:style-name="T1">d8</text:span>: Strained. Minor inconsistencies exist. Someone is asking questions.</text:p>
        </text:list-item>
        <text:list-item>
          <text:p text:style-name="P3"><text:span text:style-name="T1">d6</text:span>: Fragile. Under active scrutiny. One contradiction ends it.</text:p>
        </text:list-item>
        <text:list-item>
          <text:p text:style-name="P3"><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4">
        <text:list-item>
          <text:p text:style-name="P4"><text:span text:style-name="T1">Briefing</text:span>: The client states the objective. Information is always incomplete.</text:p>
        </text:list-item>
        <text:list-item>
          <text:p text:style-name="P4"><text:span text:style-name="T1">Planning</text:span>: The team establishes Cover, approach route, and gear allocation.</text:p>
        </text:list-item>
        <text:list-item>
          <text:p text:style-name="P4"><text:span text:style-name="T1">Execution</text:span>: Scenes unfold. Roll only when risk is present.</text:p>
        </text:list-item>
        <text:list-item>
          <text:p text:style-name="P4"><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5">
        <text:list-item>
          <text:p text:style-name="P5">GCP grey operations division — must remain deniable</text:p>
        </text:list-item>
        <text:list-item>
          <text:p text:style-name="P5">Void Consortium logistics arm</text:p>
        </text:list-item>
        <text:list-item>
          <text:p text:style-name="P5">Terran Compact intelligence bureau</text:p>
        </text:list-item>
        <text:list-item>
          <text:p text:style-name="P5">Dominion of Aquilaria noble house</text:p>
        </text:list-item>
        <text:list-item>
          <text:p text:style-name="P5">Order of Ascendancy research cell</text:p>
        </text:list-item>
        <text:list-item>
          <text:p text:style-name="P5">United Federation of Avaros council member (unofficial capacity)</text:p>
        </text:list-item>
        <text:list-item>
          <text:p text:style-name="P5">Technocratic Union dissident researcher</text:p>
        </text:list-item>
        <text:list-item>
          <text:p text:style-name="P5">Confederacy of Enthor clan representative</text:p>
        </text:list-item>
        <text:list-item>
          <text:p text:style-name="P5">Commonwealth of Elyros colony council</text:p>
        </text:list-item>
        <text:list-item>
          <text:p text:style-name="P5">Ethereal Enclave handler (contact made through implant network)</text:p>
        </text:list-item>
        <text:list-item>
          <text:p text:style-name="P5">Independent corporate interest — identity withheld</text:p>
        </text:list-item>
        <text:list-item>
          <text:p text:style-name="P5">Empire of Wrulis extraction facility commander</text:p>
        </text:list-item>
      </text:list>
      <text:p text:style-name="First_20_paragraph"><text:span text:style-name="T1">Objective</text:span></text:p>
      <text:list text:style-name="L6">
        <text:list-item>
          <text:p text:style-name="P6">Extract an asset before they’re taken</text:p>
        </text:list-item>
        <text:list-item>
          <text:p text:style-name="P6">Intercept a data package in transit</text:p>
        </text:list-item>
        <text:list-item>
          <text:p text:style-name="P6">Plant evidence that alters a GCP registry filing</text:p>
        </text:list-item>
        <text:list-item>
          <text:p text:style-name="P6">Recruit a contact inside a target organization</text:p>
        </text:list-item>
        <text:list-item>
          <text:p text:style-name="P6">Surveil a meeting and document all participants</text:p>
        </text:list-item>
        <text:list-item>
          <text:p text:style-name="P6">Retrieve physical materials from a secured facility</text:p>
        </text:list-item>
        <text:list-item>
          <text:p text:style-name="P6">Eliminate a surveillance operation without attribution</text:p>
        </text:list-item>
        <text:list-item>
          <text:p text:style-name="P6">Verify the true identity of an unknown operative</text:p>
        </text:list-item>
        <text:list-item>
          <text:p text:style-name="P6">Deliver intelligence without appearing in any record</text:p>
        </text:list-item>
        <text:list-item>
          <text:p text:style-name="P6">Prevent a diplomatic communication from being transmitted</text:p>
        </text:list-item>
        <text:list-item>
          <text:p text:style-name="P6">Establish a safe house network in hostile territory</text:p>
        </text:list-item>
        <text:list-item>
          <text:p text:style-name="P6">Identify the source of a compromise in an existing network</text:p>
        </text:list-item>
      </text:list>
      <text:p text:style-name="First_20_paragraph"><text:span text:style-name="T1">Target</text:span></text:p>
      <text:list text:style-name="L7">
        <text:list-item>
          <text:p text:style-name="P7">GCP dispute registry administrator</text:p>
        </text:list-item>
        <text:list-item>
          <text:p text:style-name="P7">Skopalian monitoring station crew</text:p>
        </text:list-item>
        <text:list-item>
          <text:p text:style-name="P7">Void Consortium transit hub operation</text:p>
        </text:list-item>
        <text:list-item>
          <text:p text:style-name="P7">Hetsusian Enclave access broker</text:p>
        </text:list-item>
        <text:list-item>
          <text:p text:style-name="P7">Ethereal Enclave recruiter</text:p>
        </text:list-item>
        <text:list-item>
          <text:p text:style-name="P7">Lynem noble house diplomatic staff</text:p>
        </text:list-item>
        <text:list-item>
          <text:p text:style-name="P7">Order of Ascendancy field research team</text:p>
        </text:list-item>
        <text:list-item>
          <text:p text:style-name="P7">Terran Compact frontier outpost command</text:p>
        </text:list-item>
        <text:list-item>
          <text:p text:style-name="P7">Rift Reavers safe harbor operation</text:p>
        </text:list-item>
        <text:list-item>
          <text:p text:style-name="P7">Avaros Federation council member’s senior staff</text:p>
        </text:list-item>
        <text:list-item>
          <text:p text:style-name="P7">Imperial extraction facility management chain</text:p>
        </text:list-item>
        <text:list-item>
          <text:p text:style-name="P7">Unknown operative — allegiance unconfirmed</text:p>
        </text:list-item>
      </text:list>
      <text:p text:style-name="First_20_paragraph"><text:span text:style-name="T1">Location</text:span></text:p>
      <text:list text:style-name="L8">
        <text:list-item>
          <text:p text:style-name="P8">GCP neutral station (monitored, procedurally complex)</text:p>
        </text:list-item>
        <text:list-item>
          <text:p text:style-name="P8">Avaros trade hub (crowded, multi-species, overlapping jurisdictions)</text:p>
        </text:list-item>
        <text:list-item>
          <text:p text:style-name="P8">WAN corridor maintenance station (isolated, technical access required)</text:p>
        </text:list-item>
        <text:list-item>
          <text:p text:style-name="P8">Hetsusian Enclave fringe station (clan-ruled, no standard protocols)</text:p>
        </text:list-item>
        <text:list-item>
          <text:p text:style-name="P8">Aquilarian-controlled Andromeda outpost (hierarchical, under continuous surveillance)</text:p>
        </text:list-item>
        <text:list-item>
          <text:p text:style-name="P8">Dead zone (no WAN, oddspace only, no external communication possible)</text:p>
        </text:list-item>
        <text:list-item>
          <text:p text:style-name="P8">Skopalian research station (credential-controlled, meritocratic access)</text:p>
        </text:list-item>
        <text:list-item>
          <text:p text:style-name="P8">Terran Compact orbital station (dual administrative authority, contested jurisdiction)</text:p>
        </text:list-item>
        <text:list-item>
          <text:p text:style-name="P8">Void Consortium transit hub (grey-market infrastructure, eyes everywhere)</text:p>
        </text:list-item>
        <text:list-item>
          <text:p text:style-name="P8">Commonwealth colony at polity border (autonomous, poorly documented)</text:p>
        </text:list-item>
        <text:list-item>
          <text:p text:style-name="P8">Imperial extraction facility in LMC border territory (frontier discretion applies)</text:p>
        </text:list-item>
        <text:list-item>
          <text:p text:style-name="P8">Derelict vessel or debris field (unmapped, physical hazard, no witnesses)</text:p>
        </text:list-item>
      </text:list>
      <text:p text:style-name="First_20_paragraph"><text:span text:style-name="T1">Complication</text:span></text:p>
      <text:list text:style-name="L9">
        <text:list-item>
          <text:p text:style-name="P9">A second team is running a parallel operation against the same target</text:p>
        </text:list-item>
        <text:list-item>
          <text:p text:style-name="P9">Your client contact has been replaced — or was never real</text:p>
        </text:list-item>
        <text:list-item>
          <text:p text:style-name="P9">The target already knows someone is coming</text:p>
        </text:list-item>
        <text:list-item>
          <text:p text:style-name="P9">An unexpected polity patrol has increased presence in the area</text:p>
        </text:list-item>
        <text:list-item>
          <text:p text:style-name="P9">One operative’s Cover has a gap the target has already identified</text:p>
        </text:list-item>
        <text:list-item>
          <text:p text:style-name="P9">The asset you’re extracting doesn’t want to leave</text:p>
        </text:list-item>
        <text:list-item>
          <text:p text:style-name="P9">The operation’s true objective differs from what the client stated</text:p>
        </text:list-item>
        <text:list-item>
          <text:p text:style-name="P9">A former TIE is now actively working for the opposition</text:p>
        </text:list-item>
        <text:list-item>
          <text:p text:style-name="P9">There is no clean extraction route — improvise or go dark</text:p>
        </text:list-item>
        <text:list-item>
          <text:p text:style-name="P9">The target has Ethereal Enclave implant coverage you didn’t account for</text:p>
        </text:list-item>
        <text:list-item>
          <text:p text:style-name="P9">Physical evidence of a previous operation links back to this team</text:p>
        </text:list-item>
        <text:list-item>
          <text:p text:style-name="P9">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10">
        <text:list-item>
          <text:p text:style-name="P10"><text:span text:style-name="T1">Rebuild Cover</text:span>: Establish or repair a Cover identity (see Cover rules)</text:p>
        </text:list-item>
        <text:list-item>
          <text:p text:style-name="P10"><text:span text:style-name="T1">Work the Network</text:span>: Create a new TIE or shift an existing TIE by ±1</text:p>
        </text:list-item>
        <text:list-item>
          <text:p text:style-name="P10"><text:span text:style-name="T1">Go Dark</text:span>: Clear 1 Heat; gain no other benefit this cycle</text:p>
        </text:list-item>
        <text:list-item>
          <text:p text:style-name="P10"><text:span text:style-name="T1">Study</text:span>: Increase a skill</text:p>
        </text:list-item>
        <text:list-item>
          <text:p text:style-name="P10"><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11">
        <text:list-item>
          <text:p text:style-name="P11"><text:span text:style-name="T1">Set Expectations</text:span>: Consider your operative’s cover, objective, and what obstacles the target likely has in place.</text:p>
        </text:list-item>
        <text:list-item>
          <text:p text:style-name="P11"><text:span text:style-name="T1">Test Uncertainty</text:span>: When the world’s response is genuinely unclear, ask the oracle a closed question.</text:p>
        </text:list-item>
        <text:list-item>
          <text:p text:style-name="P11"><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2">
        <text:list-item>
          <text:p text:style-name="P12"><text:span text:style-name="T1">1–2 No, and…</text:span>: What you expected doesn’t happen, and things get worse.</text:p>
        </text:list-item>
        <text:list-item>
          <text:p text:style-name="P12"><text:span text:style-name="T1">3–4 Yes, but…</text:span>: What you expected happens, but with a complication.</text:p>
        </text:list-item>
        <text:list-item>
          <text:p text:style-name="P12"><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GREY CHANNEL</dc:title>
    <dc:description/>
    <dc:subject/>
    <meta:keyword/>
    <dc:language>en</dc:language>
    <meta:initial-creator>Roberto Bisceglie</meta:initial-creator>
    <dc:creator>Roberto Bisceglie</dc:creator>
    <meta:creation-date>2026-06-04T06:12:28Z</meta:creation-date>
    <dc:date>2026-06-04T06:12:28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