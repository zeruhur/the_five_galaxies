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46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Conglomerate of Sol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Conglomerate of Sol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Conglomerate of Sol</text:span> — The human polity governing a narrow strip of Orion’s Arm in the Milky Way; the largest human political entity and a minor player at the galactic scale.</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Conglomerate of Sol’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The Five Galaxies</dc:title>
    <dc:description/>
    <dc:subject/>
    <meta:keyword/>
    <dc:language>en</dc:language>
    <meta:initial-creator>Roberto Bisceglie</meta:initial-creator>
    <dc:creator>Roberto Bisceglie</dc:creator>
    <meta:creation-date>2026-06-04T07:35:52Z</meta:creation-date>
    <dc:date>2026-06-04T07:35:5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